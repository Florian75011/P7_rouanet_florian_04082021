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1.A1" style:family="table-cell">
      <style:table-cell-properties style:vertical-align="middle" fo:padding="0.049cm" fo:border="none"/>
    </style:style>
    <style:style style:name="P1" style:family="paragraph" style:parent-style-name="Table_20_Contents" style:list-style-name="L1">
      <style:paragraph-properties fo:text-align="justify" style:justify-single-word="false"/>
    </style:style>
    <style:style style:name="P2" style:family="paragraph" style:parent-style-name="Table_20_Contents">
      <style:paragraph-properties fo:margin-top="0cm" fo:margin-bottom="0.499cm" fo:text-align="justify" style:justify-single-word="false"/>
    </style:style>
    <style:style style:name="P3" style:family="paragraph" style:parent-style-name="Table_20_Contents" style:list-style-name="L1">
      <style:paragraph-properties fo:margin-top="0cm" fo:margin-bottom="0.499cm" fo:text-align="justify" style:justify-single-word="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4">
      <style:paragraph-properties fo:margin-top="0cm" fo:margin-bottom="0cm"/>
    </style:style>
    <style:style style:name="P8" style:family="paragraph" style:parent-style-name="Text_20_body" style:list-style-name="L6">
      <style:paragraph-properties fo:margin-top="0cm" fo:margin-bottom="0cm"/>
    </style:style>
    <style:style style:name="P9" style:family="paragraph" style:parent-style-name="Text_20_body" style:list-style-name="L8">
      <style:paragraph-properties fo:margin-top="0cm" fo:margin-bottom="0cm"/>
    </style:style>
    <style:style style:name="P10" style:family="paragraph" style:parent-style-name="Text_20_body" style:list-style-name="L10">
      <style:paragraph-properties fo:margin-top="0cm" fo:margin-bottom="0cm"/>
    </style:style>
    <style:style style:name="P11" style:family="paragraph" style:parent-style-name="Text_20_body" style:list-style-name="L11">
      <style:paragraph-properties fo:margin-top="0cm" fo:margin-bottom="0cm"/>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Scénario</text:h>
      <text:p text:style-name="Text_20_body">Vous êtes développeur depuis plus d'un an chez <text:span text:style-name="Strong_20_Emphasis">CONNECT-E</text:span>, une petite agence web regroupant une douzaine d'employés.</text:p>
      <text:p text:style-name="Text_20_body">Votre directrice, Stéphanie, invite toute l'agence à prendre un verre pour célébrer une bonne nouvelle ! Elle vient de signer un contrat pour un nouveau projet ambitieux ! ?</text:p>
      <text:p text:style-name="Text_20_body">Le client en question est <text:span text:style-name="Strong_20_Emphasis">Groupomania</text:span>, un groupe spécialisé dans la grande distribution et l'un des plus fidèles clients de l'agence.</text:p>
      <text:p text:style-name="Text_20_body"> </text:p>
      <text:p text:style-name="Text_20_body"><draw:a xlink:type="simple" xlink:href="https://user.oc-static.com/upload/2019/09/04/15676009353158_image2.png"><draw:frame draw:style-name="fr1" draw:name="images1" text:anchor-type="as-char" svg:width="7.433cm" svg:height="1.519cm" draw:z-index="0"><draw:image xlink:href="https://user.oc-static.com/upload/2019/09/04/15676009353158_image2.png" xlink:type="simple" xlink:show="embed" xlink:actuate="onLoad"/><svg:title>Le logo de Groupomania</svg:title></draw:frame></draw:a> Le logo de Groupomania </text:p>
      <text:p text:style-name="Text_20_body">Le projet consiste à construire un <text:span text:style-name="Strong_20_Emphasis">réseau social interne</text:span> pour les employés de Groupomania. Le but de cet outil est de faciliter les interactions entre collègues. Le département RH de Groupomania a laissé libre cours à son imagination pour les fonctionnalités du réseau et a imaginé plusieurs briques pour favoriser les échanges entre collègues.</text:p>
      <text:p text:style-name="Text_20_body">Stéphanie vous envoie un message via l’outil de messagerie instantanée de l’entreprise.</text:p>
      <text:p text:style-name="Text_20_body"> </text:p>
      <text:p text:style-name="Text_20_body"><draw:a xlink:type="simple" xlink:href="https://user.oc-static.com/upload/2019/11/19/15741782856137_15718405231143_fakechat%20%2810%29.png"><draw:frame draw:style-name="fr1" draw:name="images2" text:anchor-type="as-char" svg:width="15.212cm" svg:height="9.239cm" draw:z-index="1"><draw:image xlink:href="https://user.oc-static.com/upload/2019/11/19/15741782856137_15718405231143_fakechat%20%2810%29.png" xlink:type="simple" xlink:show="embed" xlink:actuate="onLoad"/><svg:title>&gt; Stéphanie : Hello, comme tu le sais, nous démarrons un très beau projet avec Groupomania et j’aimerais que ce soit toi qui gères la partie développement.&gt; Stéphanie : Groupomania a déjà réfléchi aux fonctionnalités à intégrer dans le réseau social. Il s’agit en fait de produits déjà existants :9GAG - ils veulent que les employés partagent et commentent les gifs avec d'autres collègues ;Reddit - ils veulent que les employés écrivent et/ou partagent des articles avec leurs collègues sur des sujets qui les intéressent. &gt; Vous : Super, je prends note. Est-ce qu’ils t’ont fourni les spécifications fonctionnelles ?&gt; Stéphanie : Oui, je te les envoie par mail tout de suite :)</svg:title></draw:frame></draw:a> La conversation entre Sophie et vous </text:p>
      <text:p text:style-name="Text_20_body">Quelques minutes plus tard, vous recevez un mail de Stéphanie.</text:p>
      <text:p text:style-name="Text_20_body"> </text:p>
      <table:table table:name="Tableau1" table:style-name="Tableau1">
        <table:table-column table:style-name="Tableau1.A"/>
        <table:table-row>
          <table:table-cell table:style-name="Tableau1.A1" office:value-type="string">
            <text:p text:style-name="P2"><text:span text:style-name="Emphasis">De : Stéphanie R</text:span></text:p>
            <text:p text:style-name="P2"><text:span text:style-name="Emphasis">À : Moi</text:span></text:p>
            <text:p text:style-name="P2"><text:span text:style-name="Strong_20_Emphasis">Lancement projet Groupomania</text:span></text:p>
            <text:p text:style-name="P2"><text:soft-page-break/>--------------------------------------------------------------------------------------------</text:p>
            <text:p text:style-name="P2">Bonjour,</text:p>
            <text:p text:style-name="P2">Comme convenu, voici les <text:a xlink:type="simple" xlink:href="https://s3-eu-west-1.amazonaws.com/course.oc-static.com/projects/DWJ_FR_P7/Groupomania_Specs_FR_DWJ_VF.pdf" text:style-name="Internet_20_link" text:visited-style-name="Visited_20_Internet_20_Link">spécifications fonctionnelles</text:a>. Tu trouveras également les <text:a xlink:type="simple" xlink:href="https://s3-eu-west-1.amazonaws.com/course.oc-static.com/projects/DWJ_FR_P7/Groupomania_Logos+(3).zip" text:style-name="Internet_20_link" text:visited-style-name="Visited_20_Internet_20_Link">logos</text:a> de l’organisation pour l’habillage du site.</text:p>
            <text:p text:style-name="P2">Par ailleurs, Groupomania et moi avons convenu que l’un des employés du groupe testera un MVP du produit, avec une seule des deux fonctionnalités proposées.</text:p>
            <text:p text:style-name="P2">Cela nous permettra de nous assurer que nous répondons à leurs attentes.</text:p>
            <text:p text:style-name="P2">Après plusieurs réunions avec Groupomania, il semble que les paramètres du projet changent régulièrement, je pense qu’une organisation “agile” serait plus adaptée pour s’adapter aux besoins du client au fur et à mesure des commentaires et affiner l’application au fil de l’eau.</text:p>
            <text:p text:style-name="P2">Je suis à ta disposition pour toute question.</text:p>
            <text:p text:style-name="P2">Stéphanie</text:p>
            <text:p text:style-name="P2"><text:span text:style-name="Emphasis">De : Moi</text:span></text:p>
            <text:p text:style-name="P2"><text:span text:style-name="Emphasis">À : Stéphanie R</text:span></text:p>
            <text:p text:style-name="P2"><text:span text:style-name="Strong_20_Emphasis">Re : Lancement projet Groupomania</text:span></text:p>
            <text:p text:style-name="P2">-----------------------------------------------------------------------------</text:p>
            <text:p text:style-name="P2">Merci Stéphanie pour toutes ces informations !</text:p>
            <text:p text:style-name="P2">Si je comprends bien, je dois fournir une première version d’une des fonctionnalités proposées par Groupomania et j’ai carte blanche concernant la forme que cela va prendre ?</text:p>
            <text:p text:style-name="P2">Merci pour ces précisions.</text:p>
            <text:p text:style-name="P2"><text:span text:style-name="Emphasis">De : Stéphanie R</text:span></text:p>
            <text:p text:style-name="P2"><text:span text:style-name="Emphasis">À : Moi</text:span></text:p>
            <text:p text:style-name="P2"><text:span text:style-name="Strong_20_Emphasis">Re : re : Lancement projet Groupomania</text:span></text:p>
            <text:p text:style-name="P2">--------------------------------------------------------------------------</text:p>
            <text:p text:style-name="P2">Oui, c’est ça !</text:p>
            <text:p text:style-name="P2">La seule contrainte est que le client utilise une base de données relationnelles qui se manipule avec le langage SQL pour le stockage de données. Il faudra donc en tenir compte lorsque tu construiras ton application. Tu devras t’assurer que l’utilisateur puisse requêter les données requises depuis SQL et puisse soumettre ces changements à la base de données SQL. Les données de connexion doivent également être sécurisées. </text:p>
            <text:p text:style-name="P2"><text:soft-page-break/>Merci.</text:p>
            <text:p text:style-name="P2">Stéphanie</text:p>
            <text:p text:style-name="P2"><text:span text:style-name="Emphasis">De : Moi</text:span></text:p>
            <text:p text:style-name="P2"><text:span text:style-name="Emphasis">À : Stéphanie R</text:span></text:p>
            <text:p text:style-name="P2"/>
            <text:p text:style-name="P2"><text:span text:style-name="Strong_20_Emphasis">Re : re : re : Lancement projet Groupomania</text:span></text:p>
            <text:p text:style-name="P2">----------------------------------------------------------------------------------</text:p>
            <text:p text:style-name="P2">Ah oui, je vois ! Peux-tu me préciser quelles tâches entrent dans le périmètre de ma mission ?</text:p>
            <text:p text:style-name="P2">Merci</text:p>
            <text:p text:style-name="P2"><text:span text:style-name="Emphasis">De : Stéphanie R</text:span></text:p>
            <text:p text:style-name="P2"><text:span text:style-name="Emphasis">À : Moi</text:span></text:p>
            <text:p text:style-name="P2"><text:span text:style-name="Strong_20_Emphasis">Re : re : re : re : Lancement projet Groupomania</text:span></text:p>
            <text:p text:style-name="P2">----------------------------------------------------------------------------------------</text:p>
            <text:p text:style-name="P2">Bien sûr. Tu vas devoir :</text:p>
            <text:list xml:id="list6852444022313387908" text:style-name="L1">
              <text:list-item>
                <text:p text:style-name="P1">choisir la fonctionnalité que tu vas développer, </text:p>
              </text:list-item>
              <text:list-item>
                <text:p text:style-name="P1">estimer le temps que tu passeras sur le développement de chaque fonctionnalité, </text:p>
              </text:list-item>
              <text:list-item>
                <text:p text:style-name="P3">développer la première version de l'application. </text:p>
              </text:list-item>
            </text:list>
            <text:p text:style-name="P2">Deux dernières choses, tu devras faire en sorte que la web app puisse se connecter et se déconnecter à l’application et que la session de l’utilisateur persiste pendant qu’il est connecté.</text:p>
            <text:p text:style-name="P2">Tu peux utiliser le framework Front-End de ton choix (React, Vue, Angular, Ember, Meteor, Aurelia...). Par contre, le projet doit être codé en Javascript, donc n'utilise pas le framework Symfony. Enfin, tes pages devront respecter les standards WCAG.</text:p>
            <text:p text:style-name="P2">Bon courage et à dispo si besoin <draw:frame draw:style-name="fr2" draw:name="images3" text:anchor-type="as-char" svg:width="0.377cm" svg:height="0.377cm" draw:z-index="2"><draw:image xlink:href="https://oc-images.imgix.net/imgix/smile.png?auto=compress,format&amp;q=80" xlink:type="simple" xlink:show="embed" xlink:actuate="onLoad"/></draw:frame></text:p>
            <text:p text:style-name="P2">Stéphanie</text:p>
          </table:table-cell>
        </table:table-row>
      </table:table>
      <text:p text:style-name="Text_20_body"><text:line-break/>Avec tous ces éléments en tête, vous vous attaquez à la réalisation de ce beau projet.</text:p>
      <text:p text:style-name="Text_20_body"/>
      <text:p text:style-name="Text_20_body"/>
      <text:p text:style-name="Text_20_body"/>
      <text:h text:style-name="Heading_20_3" text:outline-level="3"><text:soft-page-break/>Livrables</text:h>
      <text:list xml:id="list6031054403744011382" text:style-name="L2">
        <text:list-item>
          <text:p text:style-name="P4">  Le<text:span text:style-name="Strong_20_Emphasis"> lien</text:span> du repo GitHub contenant le code de l’application. </text:p>
        </text:list-item>
      </text:list>
      <text:p text:style-name="Text_20_body">Pour faciliter votre passage au jury, déposez sur la plateforme, dans un dossier nommé “<text:span text:style-name="Emphasis">P7_nom_prenom</text:span>”, tous les livrables du projet. Chaque livrable doit être nommé avec le numéro du projet et selon l'ordre dans lequel il apparaît, par exemple “<text:span text:style-name="Emphasis">P7_01_lienGithub</text:span>”.</text:p>
      <text:h text:style-name="Heading_20_3" text:outline-level="3">Soutenance</text:h>
      <text:p text:style-name="Text_20_body">La soutenance, d’une durée maximum de 30 minutes, se déroulera en deux parties :</text:p>
      <text:list xml:id="list2995822458417400859" text:style-name="L3">
        <text:list-item>
          <text:p text:style-name="P5"><text:span text:style-name="Strong_20_Emphasis">Partie 1 – 20 minutes : Simulation d'une réunion professionnelle.</text:span> </text:p>
        </text:list-item>
      </text:list>
      <text:p text:style-name="Text_20_body"><text:span text:style-name="Emphasis">L’évaluateur jouera le rôle de Stéphanie, la directrice de l’agence (il pourra vous interrompre pour vous poser des questions).</text:span></text:p>
      <text:list xml:id="list306635134391928115" text:style-name="L4">
        <text:list-item>
          <text:list>
            <text:list-item>
              <text:p text:style-name="P7">[~ 20 minutes] Vous réaliserez une présentation de votre site en mettant en avant les fonctionnalités améliorées. L’évaluateur doit être capable de cloner l’application et de la lancer. </text:p>
            </text:list-item>
          </text:list>
        </text:list-item>
        <text:list-item>
          <text:p text:style-name="P7"><text:span text:style-name="Strong_20_Emphasis">Partie 2 – 10 minutes : Retour sur la soutenance</text:span> </text:p>
          <text:list>
            <text:list-item>
              <text:p text:style-name="P7">Échange de questions/réponses : l’évaluateur pourra revenir sur certains points pour vous questionner sur vos choix. </text:p>
            </text:list-item>
            <text:list-item>
              <text:p text:style-name="P6">L’évaluateur vous fera un débrief de votre soutenance et de vos livrables. </text:p>
            </text:list-item>
          </text:list>
        </text:list-item>
      </text:list>
      <text:h text:style-name="Heading_20_3" text:outline-level="3">Compétences évaluées</text:h>
      <text:list xml:id="list3807868265555533281" text:style-name="L6">
        <text:list-item>
          <text:p text:style-name="P8">Personnaliser le contenu envoyé à un client web</text:p>
        </text:list-item>
      </text:list>
      <text:list xml:id="list4694953899957631264" text:style-name="L8">
        <text:list-item>
          <text:p text:style-name="P9">Authentifier un utilisateur et maintenir sa session</text:p>
        </text:list-item>
      </text:list>
      <text:list xml:id="list2904634025254127480" text:style-name="L10">
        <text:list-item>
          <text:p text:style-name="P10">Gérer un stockage de données à l'aide de SQL</text:p>
        </text:list-item>
      </text:list>
      <text:list xml:id="list1610521369466817322" text:style-name="L11">
        <text:list-item>
          <text:p text:style-name="P11">Implémenter un stockage de données sécurisé en utilisant SQL</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rian Rouanet</meta:initial-creator>
    <meta:creation-date>2021-08-04T18:15:55</meta:creation-date>
    <meta:document-statistic meta:table-count="1" meta:image-count="3" meta:object-count="0" meta:page-count="4" meta:paragraph-count="73" meta:word-count="799" meta:character-count="5256"/>
    <dc:date>2021-08-04T18:16:50</dc:date>
    <dc:creator>Florian Rouanet</dc:creator>
    <meta:editing-duration>PT55S</meta:editing-duration>
    <meta:editing-cycles>1</meta:editing-cycles>
    <meta:generator>OpenOffice/4.1.8$Unix OpenOffice.org_project/418m3$Build-9803</meta:generator>
  </office:meta>
</office:document-meta>
</file>